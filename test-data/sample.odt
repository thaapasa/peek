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office:version="1.2">
  <office:automatic-styles>
    <style:style style:name="T1" style:family="text">
      <style:text-properties fo:font-weight="bold"/>
    </style:style>
    <style:style style:name="T2" style:family="text">
      <style:text-properties fo:font-style="italic" fo:color="#cc3333"/>
    </style:style>
    <style:style style:name="T3" style:family="text">
      <style:text-properties style:text-line-through-style="solid"/>
    </style:style>
  </office:automatic-styles>
  <office:body>
    <office:text>
      <text:h text:outline-level="1">Welcome to peek</text:h>
      <text:p>Plain prose with <text:span text:style-name="T1">bold</text:span> and <text:span text:style-name="T2">red italic</text:span> and <text:span text:style-name="T3">struck-through</text:span> spans.</text:p>
      <text:h text:outline-level="2">Subsection</text:h>
      <text:p>A <text:a xlink:href="https://example.com">linked phrase</text:a> follows.</text:p>
      <text:list>
        <text:list-item>
          <text:p>first bullet</text:p>
        </text:list-item>
        <text:list-item>
          <text:p>second bullet</text:p>
          <text:list>
            <text:list-item>
              <text:p>nested item</text:p>
            </text:list-item>
          </text:list>
        </text:list-item>
      </text:list>
      <text:p>An inline image:<draw:frame><draw:image xlink:href="Pictures/diagram.png"/></draw:frame></text:p>
      <table:table>
        <table:table-row>
          <table:table-cell>
            <text:p>row1col1</text:p>
          </table:table-cell>
          <table:table-cell>
            <text:p>row1col2</text:p>
          </table:table-cell>
        </table:table-row>
        <table:table-row>
          <table:table-cell>
            <text:p>row2col1</text:p>
          </table:table-cell>
          <table:table-cell>
            <text:p>row2col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office:version="1.2"/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dc:title>Peek sample ODT</dc:title>
    <dc:creator>Tuukka Haapasalo</dc:creator>
    <dc:subject>Test fixture</dc:subject>
    <dc:description>A small ODT used for peek's parser tests.</dc:description>
    <meta:keyword>peek</meta:keyword>
    <meta:keyword>odt</meta:keyword>
    <meta:keyword>fixture</meta:keyword>
    <meta:creation-date>2026-05-12T10:00:00</meta:creation-date>
    <dc:date>2026-05-12T10:30:00</dc:date>
  </office:meta>
</office:document-meta>
</file>